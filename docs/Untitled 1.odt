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969" officeooo:paragraph-rsid="001a3969"/>
    </style:style>
    <style:style style:name="T1" style:family="text">
      <style:text-properties officeooo:rsid="001be1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instagram/v1/createUser" text:style-name="Internet_20_link" text:visited-style-name="Visited_20_Internet_20_Link">https://www.instagram/v1/createUser</text:a><text:line-break/><text:line-break/>{<text:line-break/><text:tab/>mobileNumber:87897779,</text:p>
      <text:p text:style-name="P1"><text:tab/>password:””,</text:p>
      <text:p text:style-name="P1"><text:tab/>Dob:736468,</text:p>
      <text:p text:style-name="P1"><text:tab/>Name:jae</text:p>
      <text:p text:style-name="P1">}</text:p>
      <text:p text:style-name="P1">transtaction:xyz<text:line-break/><text:line-break/><text:a xlink:type="simple" xlink:href="http://www.instagram/v3/otpvalidation" text:style-name="Internet_20_link" text:visited-style-name="Visited_20_Internet_20_Link">http://www.localhost/v3/otpvalidation</text:a><text:line-break/>{</text:p>
      <text:p text:style-name="P1"><text:tab/>transactionId:xyz,</text:p>
      <text:p text:style-name="P1"><text:tab/>otp:8746</text:p>
      <text:p text:style-name="P1">}</text:p>
      <text:p text:style-name="P1"/>
      <text:p text:style-name="P1">response{</text:p>
      <text:p text:style-name="P1"><text:tab/>response is late;</text:p>
      <text:p text:style-name="P1">}<text:line-break/><text:line-break/>https://www.instgram/v1/onboarding</text:p>
      <text:p text:style-name="P1">{</text:p>
      <text:p text:style-name="P1"/>
      <text:p text:style-name="P1">}<text:line-break/><text:line-break/></text:p>
      <text:p text:style-name="P1"/>
      <text:p text:style-name="P1">phonePay<text:line-break/><text:line-break/><text:a xlink:type="simple" xlink:href="https://phonepay/v1payamount" text:style-name="Internet_20_link" text:visited-style-name="Visited_20_Internet_20_Link">https://phonepay/v1payamount</text:a><text:line-break/>{</text:p>
      <text:p text:style-name="P1"><text:tab/><text:a xlink:type="simple" xlink:href="mailto:kajjkdhah@paytm" text:style-name="Internet_20_link" text:visited-style-name="Visited_20_Internet_20_Link">kajjkdhah@</text:a>sbi<text:line-break/><text:tab/>amount: 200</text:p>
      <text:p text:style-name="P1">}</text:p>
      <text:p text:style-name="P1"/>
      <text:p text:style-name="P1"><text:a xlink:type="simple" xlink:href="https://sbi/upi/sendamount" text:style-name="Internet_20_link" text:visited-style-name="Visited_20_Internet_20_Link">https://localhost/upi/sendamount</text:a></text:p>
      <text:p text:style-name="P1">{</text:p>
      <text:p text:style-name="P1"><text:tab/>transatctionid:200;</text:p>
      <text:p text:style-name="P1">}</text:p>
      <text:p text:style-name="P1"/>
      <text:p text:style-name="P1">response says</text:p>
      <text:p text:style-name="P1">success/fail/<text:span text:style-name="T1">response, bank 401,server</text:span></text:p>
      <text:p text:style-name="P1"/>
      <text:p text:style-name="P1">phonepay</text:p>
      <text:p text:style-name="P1">payment declined by ban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3T19:05:09.931169338</meta:creation-date>
    <dc:date>2026-06-23T19:53:03.539175555</dc:date>
    <meta:editing-duration>PT24M41S</meta:editing-duration>
    <meta:editing-cycles>1</meta:editing-cycles>
    <meta:document-statistic meta:table-count="0" meta:image-count="0" meta:object-count="0" meta:page-count="1" meta:paragraph-count="25" meta:word-count="42" meta:character-count="456" meta:non-whitespace-character-count="423"/>
    <meta:generator>LibreOffice/24.2.7.2$Linux_X86_64 LibreOffice_project/420$Build-2</meta:generator>
  </office:meta>
</office:document-meta>
</file>