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5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7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8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9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0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7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="Google 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3">1. Device Interaction &amp; Hardware Control</text:span></text:h>
      <text:list text:style-name="L1">
        <text:list-item>
          <text:p text:style-name="P3"><text:span text:style-name="Source_20_Text"><text:span text:style-name="T2">pressKey(KeyEvent keyEvent)</text:span></text:span></text:p>
          <text:p text:style-name="P11">Simulates a hardware or virtual key press event on the device (e.g., Home, Back, Volume Up).</text:p>
        </text:list-item>
        <text:list-item>
          <text:p text:style-name="P3"><text:span text:style-name="Source_20_Text"><text:span text:style-name="T2">longPressKey(KeyEvent keyEvent)</text:span></text:span></text:p>
          <text:p text:style-name="P11">Simulates holding down a hardware or virtual key for an extended duration.</text:p>
        </text:list-item>
        <text:list-item>
          <text:p text:style-name="P3"><text:bookmark text:name="p-rc_e788cc40acf56e31-19"/><text:span text:style-name="Source_20_Text"><text:span text:style-name="T2">getBatteryInfo()</text:span></text:span></text:p>
          <text:p text:style-name="P11"><text:bookmark text:name="p-rc_e788cc40acf56e31-19 Copy 1"/>Retrieves real-time battery diagnostics including battery status, level, and health from the device. </text:p>
        </text:list-item>
        <text:list-item>
          <text:p text:style-name="P3"><text:span text:style-name="Source_20_Text"><text:span text:style-name="T2">getDeviceTime()</text:span></text:span></text:p>
          <text:p text:style-name="P11">Fetches the current internal system date and time of the target Android device.</text:p>
        </text:list-item>
        <text:list-item>
          <text:p text:style-name="P3"><text:bookmark text:name="p-rc_e788cc40acf56e31-20"/><text:span text:style-name="Source_20_Text"><text:span text:style-name="T2">lockDevice()</text:span></text:span><text:span text:style-name="T2"> / </text:span><text:span text:style-name="Source_20_Text"><text:span text:style-name="T2">unlockDevice()</text:span></text:span><text:span text:style-name="T1"> Locks the mobile screen or unlocks it if it is currently hidden behind a secure or insecure lock screen. </text:span></text:p>
        </text:list-item>
        <text:list-item>
          <text:p text:style-name="P3"><text:span text:style-name="Source_20_Text"><text:span text:style-name="T2">isDeviceLocked()</text:span></text:span></text:p>
          <text:p text:style-name="P11">Returns a boolean indicating whether the device's screen is locked.</text:p>
        </text:list-item>
        <text:list-item>
          <text:p text:style-name="P3"><text:span text:style-name="Source_20_Text"><text:span text:style-name="T2">hideKeyboard()</text:span></text:span></text:p>
          <text:p text:style-name="P11">Hides the active on-screen software keyboard if it is visible on the display.</text:p>
        </text:list-item>
        <text:list-item>
          <text:p text:style-name="P3"><text:span text:style-name="Source_20_Text"><text:span text:style-name="T2">isOnScreenKeyboardVisible()</text:span></text:span></text:p>
          <text:p text:style-name="P11">Checks and confirms whether the soft keyboard is currently taking up screen real estate.</text:p>
        </text:list-item>
      </text:list>
      <text:h text:style-name="P1" text:outline-level="2">2. Application Management</text:h>
      <text:list text:style-name="L2">
        <text:list-item>
          <text:p text:style-name="P4"><text:bookmark text:name="p-rc_e788cc40acf56e31-21"/><text:span text:style-name="Source_20_Text"><text:span text:style-name="T2">installApp(String appPath)</text:span></text:span></text:p>
          <text:p text:style-name="P12"><text:bookmark text:name="p-rc_e788cc40acf56e31-21 Copy 1"/>Installs a package/APK file located at the specified local or remote path onto the target device. </text:p>
        </text:list-item>
        <text:list-item>
          <text:p text:style-name="P4"><text:span text:style-name="Source_20_Text"><text:span text:style-name="T2">isAppInstalled(String bundleId)</text:span></text:span></text:p>
          <text:p text:style-name="P4"><text:span text:style-name="T1">Verifies if an application with the designated package name (e.g., </text:span><text:span text:style-name="Source_20_Text"><text:span text:style-name="T1">com.example.app</text:span></text:span><text:span text:style-name="T1">) exists on the device.</text:span></text:p>
        </text:list-item>
        <text:list-item>
          <text:p text:style-name="P4"><text:span text:style-name="Source_20_Text"><text:span text:style-name="T2">activateApp(String bundleId)</text:span></text:span></text:p>
          <text:p text:style-name="P12">Launches a previously installed application or brings a backgrounded app straight to the foreground.</text:p>
        </text:list-item>
        <text:list-item>
          <text:p text:style-name="P4"><text:bookmark text:name="p-rc_e788cc40acf56e31-22"/><text:soft-page-break/><text:span text:style-name="Source_20_Text"><text:span text:style-name="T2">terminateApp(String bundleId)</text:span></text:span></text:p>
          <text:p text:style-name="P12"><text:bookmark text:name="p-rc_e788cc40acf56e31-22 Copy 1"/>Forcefully shuts down and terminates the process of the specified running application. </text:p>
        </text:list-item>
        <text:list-item>
          <text:p text:style-name="P4"><text:span text:style-name="Source_20_Text"><text:span text:style-name="T2">removeApp(String bundleId)</text:span></text:span></text:p>
          <text:p text:style-name="P12">Uninstalls the specified application completely from the Android file system.</text:p>
        </text:list-item>
        <text:list-item>
          <text:p text:style-name="P4"><text:span text:style-name="Source_20_Text"><text:span text:style-name="T2">runAppInBackground(Duration duration)</text:span></text:span></text:p>
          <text:p text:style-name="P12">Sends the active app to the background for a specific time window and automatically restores it to the foreground afterward.</text:p>
        </text:list-item>
        <text:list-item>
          <text:p text:style-name="P4"><text:span text:style-name="Source_20_Text"><text:span text:style-name="T2">queryAppState(String bundleId)</text:span></text:span></text:p>
          <text:p text:style-name="P12">Queries the current runtime condition of an app (e.g., NOT_RUNNING, RUNNING_IN_FOREGROUND).</text:p>
        </text:list-item>
      </text:list>
      <text:h text:style-name="P1" text:outline-level="2">3. Advanced Context &amp; Views</text:h>
      <text:list text:style-name="L3">
        <text:list-item>
          <text:p text:style-name="P5"><text:span text:style-name="Source_20_Text"><text:span text:style-name="T2">getContextHandles()</text:span></text:span></text:p>
          <text:p text:style-name="P5"><text:span text:style-name="T1">Returns a set of unique context strings representing all open views, such as </text:span><text:span text:style-name="Source_20_Text"><text:span text:style-name="T1">NATIVE_APP</text:span></text:span><text:span text:style-name="T1"> or active </text:span><text:span text:style-name="Source_20_Text"><text:span text:style-name="T1">WEBVIEW</text:span></text:span><text:span text:style-name="T1"> containers.</text:span></text:p>
        </text:list-item>
        <text:list-item>
          <text:p text:style-name="P5"><text:span text:style-name="Source_20_Text"><text:span text:style-name="T2">getContext()</text:span></text:span></text:p>
          <text:p text:style-name="P13">Retrieves the string identify of the context the driver is actively targeting.</text:p>
        </text:list-item>
        <text:list-item>
          <text:p text:style-name="P5"><text:bookmark text:name="p-rc_e788cc40acf56e31-23"/><text:span text:style-name="Source_20_Text"><text:span text:style-name="T2">context(String contextName)</text:span></text:span></text:p>
          <text:p text:style-name="P13"><text:bookmark text:name="p-rc_e788cc40acf56e31-23 Copy 1"/>Switches the testing context to a different view (essential for executing actions inside hybrid web views or Chrome instances). </text:p>
        </text:list-item>
      </text:list>
      <text:h text:style-name="P1" text:outline-level="2">4. System Settings &amp; Network Control</text:h>
      <text:list text:style-name="L4">
        <text:list-item>
          <text:p text:style-name="P6"><text:span text:style-name="Source_20_Text"><text:span text:style-name="T2">toggleAirplaneMode()</text:span></text:span></text:p>
          <text:p text:style-name="P14">Switches the device's Airplane mode setting on or off dynamically.</text:p>
        </text:list-item>
        <text:list-item>
          <text:p text:style-name="P6"><text:span text:style-name="Source_20_Text"><text:span text:style-name="T2">toggleData()</text:span></text:span></text:p>
          <text:p text:style-name="P14">Enables or disables mobile data cellular connections on the test machine.</text:p>
        </text:list-item>
        <text:list-item>
          <text:p text:style-name="P6"><text:span text:style-name="Source_20_Text"><text:span text:style-name="T2">toggleWifi()</text:span></text:span></text:p>
          <text:p text:style-name="P14">Programmatically turns the device's Wi-Fi radio on or off.</text:p>
        </text:list-item>
        <text:list-item>
          <text:p text:style-name="P6"><text:bookmark text:name="p-rc_e788cc40acf56e31-24"/><text:span text:style-name="Source_20_Text"><text:span text:style-name="T2">getClipboardText()</text:span></text:span><text:span text:style-name="T2"> / </text:span><text:span text:style-name="Source_20_Text"><text:span text:style-name="T2">setClipboardText(String text)</text:span></text:span><text:span text:style-name="T1"> Reads plain text directly from the Android system clipboard or overrides it with new textual data. </text:span></text:p>
        </text:list-item>
      </text:list>
      <text:h text:style-name="P1" text:outline-level="2"><text:soft-page-break/>5. File Push / Pull Infrastructure</text:h>
      <text:list text:style-name="L5">
        <text:list-item>
          <text:p text:style-name="P7"><text:span text:style-name="Source_20_Text"><text:span text:style-name="T2">pushFile(String remotePath, byte[] base64Data)</text:span></text:span></text:p>
          <text:p text:style-name="P15">Transfers a localized payload file onto a specific internal directory or external storage location on the Android device.</text:p>
        </text:list-item>
        <text:list-item>
          <text:p text:style-name="P7"><text:span text:style-name="Source_20_Text"><text:span text:style-name="T2">pullFile(String remotePath)</text:span></text:span></text:p>
          <text:p text:style-name="P15">Retrieves a file payload from the device's file system, returning it as a Base64 encoded array.</text:p>
        </text:list-item>
        <text:list-item>
          <text:p text:style-name="P7"><text:span text:style-name="Source_20_Text"><text:span text:style-name="T2">pullFolder(String remotePath)</text:span></text:span></text:p>
          <text:p text:style-name="P15">Compresses and pulls an entire specified directory out of the mobile file system into a zip archive format.</text:p>
        </text:list-item>
      </text:list>
      <text:h text:style-name="P1" text:outline-level="2">6. Biometrics, Performance, &amp; Emulation</text:h>
      <text:list text:style-name="L6">
        <text:list-item>
          <text:p text:style-name="P8"><text:span text:style-name="Source_20_Text"><text:span text:style-name="T2">fingerPrint(int fingerprintId)</text:span></text:span></text:p>
          <text:p text:style-name="P16">Simulates a biometric touch event on an emulator using a pre-configured, valid fingerprint profile ID.</text:p>
        </text:list-item>
        <text:list-item>
          <text:p text:style-name="P8"><text:span text:style-name="Source_20_Text"><text:span text:style-name="T2">getPerformanceData(String packageName, String dataType, int dataCount)</text:span></text:span></text:p>
          <text:p text:style-name="P16">Extracts raw performance metrics from an app, allowing you to monitor CPU, memory usage, or network status.</text:p>
        </text:list-item>
        <text:list-item>
          <text:p text:style-name="P8"><text:span text:style-name="Source_20_Text"><text:span text:style-name="T2">getSupportedPerformanceDataTypes()</text:span></text:span></text:p>
          <text:p text:style-name="P16">Returns a listing of all available performance dimensions valid for tracking on the device ecosystem.</text:p>
        </text:list-item>
        <text:list-item>
          <text:p text:style-name="P8"><text:span text:style-name="Source_20_Text"><text:span text:style-name="T2">sendSMS(String phoneNumber, String message)</text:span></text:span></text:p>
          <text:p text:style-name="P16">Instructs an Android emulator instance to intercept and receive an inbound mock SMS message string.</text:p>
        </text:list-item>
        <text:list-item>
          <text:p text:style-name="P8"><text:bookmark text:name="p-rc_e788cc40acf56e31-25"/><text:span text:style-name="Source_20_Text"><text:span text:style-name="T2">makeGsmCall(String phoneNumber, GsmCallActions action)</text:span></text:span><text:span text:style-name="T1"> Commands an emulator instance to mock incoming telephone calls (e.g., call generation, holding, or hanging up). </text:span></text:p>
        </text:list-item>
      </text:list>
      <text:h text:style-name="P1" text:outline-level="2">7. Media Recording &amp; Comparison</text:h>
      <text:list text:style-name="L7">
        <text:list-item>
          <text:p text:style-name="P9"><text:span text:style-name="Source_20_Text"><text:span text:style-name="T2">startRecordingScreen()</text:span></text:span></text:p>
          <text:p text:style-name="P17"><text:soft-page-break/>Instructs the Appium server to begin capturing screen activity on the mobile instance into an internal video buffer.</text:p>
        </text:list-item>
        <text:list-item>
          <text:p text:style-name="P9"><text:span text:style-name="Source_20_Text"><text:span text:style-name="T2">stopRecordingScreen()</text:span></text:span></text:p>
          <text:p text:style-name="P17">Halts the media recording thread and returns the final video artifact wrapped inside a Base64 string payload.</text:p>
        </text:list-item>
      </text:list>
      <text:h text:style-name="P1" text:outline-level="2">8. Element Selection &amp; Custom Extensions</text:h>
      <text:list text:style-name="L8">
        <text:list-item>
          <text:p text:style-name="P10"><text:bookmark text:name="p-rc_e788cc40acf56e31-26"/><text:span text:style-name="Source_20_Text"><text:span text:style-name="T2">findElement(By by)</text:span></text:span><text:span text:style-name="T2"> / </text:span><text:span text:style-name="Source_20_Text"><text:span text:style-name="T2">findElements(By by)</text:span></text:span><text:span text:style-name="T1"> Inherited core WebDriver engine methods to seek out singular or collections of actionable UI layout nodes using standard Appium locators. </text:span></text:p>
        </text:list-item>
        <text:list-item>
          <text:p text:style-name="P10"><text:span text:style-name="Source_20_Text"><text:span text:style-name="T2">executeScript(String script, Object... args)</text:span></text:span></text:p>
          <text:p text:style-name="P10"><text:span text:style-name="T1">Executes specific Appium vendor extension commands prefixes (like </text:span><text:span text:style-name="Source_20_Text"><text:span text:style-name="T1">mobile: shell</text:span></text:span><text:span text:style-name="T1">, </text:span><text:span text:style-name="Source_20_Text"><text:span text:style-name="T1">mobile: scrollGesture</text:span></text:span><text:span text:style-name="T1">, or </text:span><text:span text:style-name="Source_20_Text"><text:span text:style-name="T1">mobile: deepLink</text:span></text:span><text:span text:style-name="T1">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22:26:16.062535359</meta:creation-date>
    <dc:date>2026-06-01T22:28:41.083539124</dc:date>
    <meta:editing-duration>PT2M28S</meta:editing-duration>
    <meta:editing-cycles>1</meta:editing-cycles>
    <meta:document-statistic meta:table-count="0" meta:image-count="0" meta:object-count="0" meta:page-count="4" meta:paragraph-count="72" meta:word-count="682" meta:character-count="4650" meta:non-whitespace-character-count="4096"/>
    <meta:generator>LibreOffice/24.2.7.2$Linux_X86_64 LibreOffice_project/420$Build-2</meta:generator>
  </office:meta>
</office:document-meta>
</file>