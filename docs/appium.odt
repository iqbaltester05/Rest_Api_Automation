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376cm"/>
    </style:style>
    <style:style style:name="Table1.B" style:family="table-column">
      <style:table-column-properties style:column-width="5.808cm"/>
    </style:style>
    <style:style style:name="Table1.C" style:family="table-column">
      <style:table-column-properties style:column-width="5.8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15feb7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T1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pium Mastery Handbook: A Comprehensive Guide to Mobile Automation</text:h>
      <text:section text:style-name="Sect1" text:name="model-response-message-contentr_678bdedaf723f32e">
        <text:p text:style-name="Text_20_body">Welcome to the ultimate study guide for Appium. This document is structured as an institutional-grade reference manual, taking you from core architectural concepts to advanced session management, mobile gestures, and enterprise framework implementation.</text:p>
        <text:h text:style-name="Heading_20_2" text:outline-level="2">1. What is Appium?</text:h>
        <text:p text:style-name="Text_20_body"><text:span text:style-name="T1">Appium</text:span> is an open-source, cross-platform test automation framework used to automate native, mobile web, and hybrid applications.</text:p>
        <text:h text:style-name="Heading_20_3" text:outline-level="3">Key Characteristics:</text:h>
        <text:list text:style-name="L1">
          <text:list-item>
            <text:p text:style-name="P6"><text:span text:style-name="T1">Cross-Platform:</text:span> Write tests against multiple platforms (iOS, Android, Windows) using the same API.</text:p>
          </text:list-item>
          <text:list-item>
            <text:p text:style-name="P6"><text:span text:style-name="T1">Language Agnostic:</text:span> You can write tests in virtually any language with a Selenium client library (Java, Python, JavaScript, C#, Ruby).</text:p>
          </text:list-item>
          <text:list-item>
            <text:p text:style-name="P6"><text:span text:style-name="T1">No App Modification:</text:span> You do not need to alter your app code or recompile it with an SDK. Appium tests the exact binary you deploy to the App Store or Google Play.</text:p>
          </text:list-item>
        </text:list>
        <text:h text:style-name="Heading_20_3" text:outline-level="3">App Classifications:</text:h>
        <text:list text:style-name="L2">
          <text:list-item>
            <text:p text:style-name="P7"><text:span text:style-name="T1">Native Apps:</text:span> Built using platform-specific SDKs (Java/Kotlin for Android, Swift/Objective-C for iOS).</text:p>
          </text:list-item>
          <text:list-item>
            <text:p text:style-name="P7"><text:span text:style-name="T1">Mobile Web Apps:</text:span> Web applications accessed via a mobile browser (Chrome, Safari).</text:p>
          </text:list-item>
          <text:list-item>
            <text:p text:style-name="P7"><text:span text:style-name="T1">Hybrid Apps:</text:span> Web views wrapped inside a native container (built with technologies like Apache Cordova, Ionic, or Electron).</text:p>
          </text:list-item>
        </text:list>
        <text:h text:style-name="Heading_20_2" text:outline-level="2">2. How Appium Works &amp; 3. Architectural Style</text:h>
        <text:p text:style-name="Text_20_body">Appium is built on a <text:span text:style-name="T1">Client-Server Architecture</text:span>. It doesn't actually interact with the mobile device directly; instead, it acts as a translation layer utilizing the <text:span text:style-name="T1">W3C WebDriver Protocol</text:span>.</text:p>
        <text:p text:style-name="P4"><text:span text:style-name="Source_20_Text">Client Code (Java/Python/JS)| --W3C Protocol-&gt; | Appium Server (Node.js)| -Driver Commands-&gt;| Mobile Device/Emu(UiAutomator/XCUITest) |</text:span></text:p>
        <text:h text:style-name="Heading_20_3" text:outline-level="3">The Appium Architecture Explained:</text:h>
        <text:list text:style-name="L3">
          <text:list-item>
            <text:p text:style-name="P8"><text:span text:style-name="T1">The Client:</text:span> Your automation code (written in Java, Python, etc.). It sends HTTP requests containing JSON payloads (commands like <text:span text:style-name="Source_20_Text">click()</text:span> or <text:span text:style-name="Source_20_Text">sendKeys()</text:span>) to the Appium Server using the W3C WebDriver Protocol.</text:p>
          </text:list-item>
          <text:list-item>
            <text:p text:style-name="P8"><text:span text:style-name="T1">The Appium Server:</text:span> A Node.js-based server that receives HTTP requests from the client, interprets the commands, and forwards them to platform-specific drivers.</text:p>
          </text:list-item>
          <text:list-item>
            <text:p text:style-name="P8"><text:soft-page-break/><text:span text:style-name="T1">The Drivers &amp; Bootstrap:</text:span> The server passes the command to a driver (like <text:span text:style-name="Source_20_Text">UiAutomator2</text:span> for Android or <text:span text:style-name="Source_20_Text">XCUITest</text:span> for iOS). This driver communicates with a daemon inside the device/emulator (e.g., an instrumentation server running on the device) which executes the action natively.</text:p>
          </text:list-item>
        </text:list>
        <text:h text:style-name="Heading_20_2" text:outline-level="2">4. Prerequisites and Installation</text:h>
        <text:p text:style-name="Text_20_body">To set up Appium 2.x for Android testing, follow this sequential installation path:</text:p>
        <text:h text:style-name="Heading_20_3" text:outline-level="3">Step 1: System Dependencies</text:h>
        <text:list text:style-name="L4">
          <text:list-item>
            <text:p text:style-name="P9"><text:span text:style-name="T1">Java Development Kit (JDK):</text:span> Install JDK 11 or higher. Set your <text:span text:style-name="Source_20_Text">JAVA_HOME</text:span> environment variable.</text:p>
          </text:list-item>
          <text:list-item>
            <text:p text:style-name="P9"><text:span text:style-name="T1">Node.js:</text:span> Download and install Node.js (LTS version recommended).</text:p>
          </text:list-item>
          <text:list-item>
            <text:p text:style-name="P9"><text:span text:style-name="T1">Android Studio:</text:span> Install Android Studio to get the Android SDK, Virtual Device Manager (Emulator), and SDK platform tools.</text:p>
          </text:list-item>
        </text:list>
        <text:h text:style-name="Heading_20_3" text:outline-level="3">Step 2: Environment Variables</text:h>
        <text:p text:style-name="Text_20_body">Configure your system path variables (e.g., in <text:span text:style-name="Source_20_Text">.bash_profile</text:span>, <text:span text:style-name="Source_20_Text">.zshrc</text:span>, or Windows Environment Variables):</text:p>
        <text:p text:style-name="P10">Bash</text:p>
        <text:p text:style-name="Preformatted_20_Text"><text:span text:style-name="Source_20_Text">export JAVA_HOME=/path/to/jdk</text:span></text:p>
        <text:p text:style-name="Preformatted_20_Text"><text:span text:style-name="Source_20_Text">export ANDROID_HOME=/path/to/android/sdk</text:span></text:p>
        <text:p text:style-name="P3"><text:span text:style-name="Source_20_Text">export PATH=$PATH:$ANDROID_HOME/platform-tools:$ANDROID_HOME/tools:$ANDROID_HOME/tools/bin</text:span></text:p>
        <text:h text:style-name="Heading_20_3" text:outline-level="3">Step 3: Install Appium via NPM</text:h>
        <text:p text:style-name="Text_20_body">Appium 2.x utilizes a decoupled architecture where drivers are installed separately.</text:p>
        <text:p text:style-name="P10">Bash</text:p>
        <text:p text:style-name="Preformatted_20_Text"><text:span text:style-name="Source_20_Text"># Install Appium globally</text:span></text:p>
        <text:p text:style-name="Preformatted_20_Text"><text:span text:style-name="Source_20_Text">npm install -g appium</text:span></text:p>
        <text:p text:style-name="Preformatted_20_Text"/>
        <text:p text:style-name="Preformatted_20_Text"><text:span text:style-name="Source_20_Text"># Verify installation</text:span></text:p>
        <text:p text:style-name="P3"><text:span text:style-name="Source_20_Text">appium -v</text:span></text:p>
        <text:h text:style-name="Heading_20_3" text:outline-level="3">Step 4: Install the Android Driver (UiAutomator2)</text:h>
        <text:p text:style-name="P10">Bash</text:p>
        <text:p text:style-name="P3"><text:span text:style-name="Source_20_Text">appium driver install uiautomator2</text:span></text:p>
        <text:h text:style-name="Heading_20_3" text:outline-level="3">Step 5: Verify Environment with Appium Doctor</text:h>
        <text:p text:style-name="P10">Bash</text:p>
        <text:p text:style-name="Preformatted_20_Text"><text:span text:style-name="Source_20_Text">npm install -g appium-doctor</text:span></text:p>
        <text:p text:style-name="P3"><text:span text:style-name="Source_20_Text">appium-doctor --android</text:span></text:p>
        <text:h text:style-name="Heading_20_2" text:outline-level="2"><text:soft-page-break/>5. Appium Inspector</text:h>
        <text:p text:style-name="Text_20_body"><text:span text:style-name="T1">Appium Inspector</text:span> is a GUI-based desktop application (or web-hosted tool) used to visually inspect mobile app hierarchies. It acts as an attached client to your Appium server.</text:p>
        <text:h text:style-name="Heading_20_3" text:outline-level="3">Key Uses:</text:h>
        <text:list text:style-name="L5">
          <text:list-item>
            <text:p text:style-name="P11"><text:span text:style-name="T1">Locating Elements:</text:span> View accessibility IDs, XPaths, Resource IDs, and class names.</text:p>
          </text:list-item>
          <text:list-item>
            <text:p text:style-name="P11"><text:span text:style-name="T1">Interacting with UI:</text:span> Test clicks, swipes, and text inputs directly from your computer screen.</text:p>
          </text:list-item>
          <text:list-item>
            <text:p text:style-name="P11"><text:span text:style-name="T1">Generating Capabilities:</text:span> Build, test, and save JSON capability sets for session connection.</text:p>
          </text:list-item>
        </text:list>
        <text:h text:style-name="Heading_20_2" text:outline-level="2">6. UiAutomator2Options, Dependencies, and Capabilities</text:h>
        <text:h text:style-name="Heading_20_3" text:outline-level="3">Required Maven Dependencies (Java)</text:h>
        <text:p text:style-name="Text_20_body">To write Appium tests in Java, include the following in your <text:span text:style-name="Source_20_Text">pom.xml</text:span>:</text:p>
        <text:p text:style-name="P10">XML</text:p>
        <text:p text:style-name="Preformatted_20_Text"><text:span text:style-name="Source_20_Text">&lt;dependencies&gt;</text:span></text:p>
        <text:p text:style-name="Preformatted_20_Text"><text:span text:style-name="Source_20_Text"><text:s text:c="4"/>&lt;!-- Appium Java Client --&gt;</text:span></text:p>
        <text:p text:style-name="Preformatted_20_Text"><text:span text:style-name="Source_20_Text"><text:s text:c="4"/>&lt;dependency&gt;</text:span></text:p>
        <text:p text:style-name="Preformatted_20_Text"><text:span text:style-name="Source_20_Text"><text:s text:c="8"/>&lt;groupId&gt;io.appium&lt;/groupId&gt;</text:span></text:p>
        <text:p text:style-name="Preformatted_20_Text"><text:span text:style-name="Source_20_Text"><text:s text:c="8"/>&lt;artifactId&gt;java-client&lt;/artifactId&gt;</text:span></text:p>
        <text:p text:style-name="Preformatted_20_Text"><text:span text:style-name="Source_20_Text"><text:s text:c="8"/>&lt;version&gt;9.2.0&lt;/version&gt;</text:span></text:p>
        <text:p text:style-name="Preformatted_20_Text"><text:span text:style-name="Source_20_Text"><text:s text:c="4"/>&lt;/dependency&gt;</text:span></text:p>
        <text:p text:style-name="Preformatted_20_Text"><text:span text:style-name="Source_20_Text"><text:s text:c="4"/>&lt;!-- Selenium Support --&gt;</text:span></text:p>
        <text:p text:style-name="Preformatted_20_Text"><text:span text:style-name="Source_20_Text"><text:s text:c="4"/>&lt;dependency&gt;</text:span></text:p>
        <text:p text:style-name="Preformatted_20_Text"><text:span text:style-name="Source_20_Text"><text:s text:c="8"/>&lt;groupId&gt;org.seleniumhq.selenium&lt;/groupId&gt;</text:span></text:p>
        <text:p text:style-name="Preformatted_20_Text"><text:span text:style-name="Source_20_Text"><text:s text:c="8"/>&lt;artifactId&gt;selenium-java&lt;/artifactId&gt;</text:span></text:p>
        <text:p text:style-name="Preformatted_20_Text"><text:span text:style-name="Source_20_Text"><text:s text:c="8"/>&lt;version&gt;4.20.0&lt;/version&gt;</text:span></text:p>
        <text:p text:style-name="Preformatted_20_Text"><text:span text:style-name="Source_20_Text"><text:s text:c="4"/>&lt;/dependency&gt;</text:span></text:p>
        <text:p text:style-name="P3"><text:span text:style-name="Source_20_Text">&lt;/dependencies&gt;</text:span></text:p>
        <text:h text:style-name="Heading_20_3" text:outline-level="3">Understanding <text:span text:style-name="Source_20_Text">UiAutomator2Options</text:span></text:h>
        <text:p text:style-name="Text_20_body">In Appium 2.x, the old <text:span text:style-name="Source_20_Text">DesiredCapabilities</text:span> class is deprecated. We now use driver-specific options classes like <text:span text:style-name="Source_20_Text">UiAutomator2Options</text:span> to enforce strict type-safety.</text:p>
        <text:p text:style-name="P10">Java</text:p>
        <text:p text:style-name="Preformatted_20_Text"><text:span text:style-name="Source_20_Text">import io.appium.java_client.android.options.UiAutomator2Options;</text:span></text:p>
        <text:p text:style-name="Preformatted_20_Text"/>
        <text:p text:style-name="Preformatted_20_Text"><text:span text:style-name="Source_20_Text">UiAutomator2Options options = new UiAutomator2Options();</text:span></text:p>
        <text:p text:style-name="Preformatted_20_Text"><text:span text:style-name="Source_20_Text">options.setDeviceName("Pixel_7_Pro"); <text:s text:c="9"/>// Name of your emulator/device</text:span></text:p>
        <text:p text:style-name="Preformatted_20_Text"><text:span text:style-name="Source_20_Text">options.setPlatformName("Android"); <text:s text:c="11"/>// Target platform</text:span></text:p>
        <text:p text:style-name="Preformatted_20_Text"><text:span text:style-name="Source_20_Text">options.setAutomationName("UiAutomator2"); <text:s text:c="4"/>// Driving engine</text:span></text:p>
        <text:p text:style-name="Preformatted_20_Text"><text:span text:style-name="Source_20_Text">options.setApp("/path/to/your/app.apk"); <text:s text:c="6"/>// Path to local application binary</text:span></text:p>
        <text:p text:style-name="Preformatted_20_Text"><text:span text:style-name="Source_20_Text">options.setAppPackage("com.example.myapp"); <text:s text:c="2"/>// App package unique identifier</text:span></text:p>
        <text:p text:style-name="Preformatted_20_Text"><text:span text:style-name="Source_20_Text">options.setAppActivity(".MainActivity"); <text:s text:c="6"/>// Launch activity screen</text:span></text:p>
        <text:p text:style-name="Preformatted_20_Text"><text:span text:style-name="Source_20_Text">options.setNoReset(false); <text:s text:c="20"/>// Clear app data before session starts</text:span></text:p>
        <text:p text:style-name="P3"><text:span text:style-name="Source_20_Text">options.setFullReset(false); <text:s text:c="18"/>// Do not uninstall app between runs</text:span></text:p>
        <text:h text:style-name="Heading_20_2" text:outline-level="2"><text:soft-page-break/>7. Auto Server Start &amp; Emulator Management</text:h>
        <text:h text:style-name="Heading_20_3" text:outline-level="3">Programmatic Server Management</text:h>
        <text:p text:style-name="Text_20_body">Hardcoding server startups via the terminal can break CI/CD pipelines. You can start and stop the Appium server directly within your <text:span text:style-name="Source_20_Text">@BeforeSuite</text:span> and <text:span text:style-name="Source_20_Text">@AfterSuite</text:span> testing hooks using <text:span text:style-name="Source_20_Text">AppiumDriverLocalService</text:span>:</text:p>
        <text:p text:style-name="P10">Java</text:p>
        <text:p text:style-name="Preformatted_20_Text"><text:span text:style-name="Source_20_Text">import io.appium.java_client.service.local.AppiumDriverLocalService;</text:span></text:p>
        <text:p text:style-name="Preformatted_20_Text"><text:span text:style-name="Source_20_Text">import io.appium.java_client.service.local.AppiumServiceBuilder;</text:span></text:p>
        <text:p text:style-name="Preformatted_20_Text"><text:span text:style-name="Source_20_Text">import java.io.File;</text:span></text:p>
        <text:p text:style-name="Preformatted_20_Text"/>
        <text:p text:style-name="Preformatted_20_Text"><text:span text:style-name="Source_20_Text">AppiumDriverLocalService service = new AppiumServiceBuilder()</text:span></text:p>
        <text:p text:style-name="Preformatted_20_Text"><text:span text:style-name="Source_20_Text"><text:s text:c="8"/>.withAppiumJS(new File("/usr/local/lib/node_modules/appium/build/lib/main.js"))</text:span></text:p>
        <text:p text:style-name="Preformatted_20_Text"><text:span text:style-name="Source_20_Text"><text:s text:c="8"/>.withIPAddress("127.0.0.1")</text:span></text:p>
        <text:p text:style-name="Preformatted_20_Text"><text:span text:style-name="Source_20_Text"><text:s text:c="8"/>.usingPort(4723)</text:span></text:p>
        <text:p text:style-name="Preformatted_20_Text"><text:span text:style-name="Source_20_Text"><text:s text:c="8"/>.build();</text:span></text:p>
        <text:p text:style-name="Preformatted_20_Text"/>
        <text:p text:style-name="Preformatted_20_Text"><text:span text:style-name="Source_20_Text">service.start(); // Programmatic start</text:span></text:p>
        <text:p text:style-name="Preformatted_20_Text"><text:span text:style-name="Source_20_Text">// ... Execute Tests ...</text:span></text:p>
        <text:p text:style-name="P3"><text:span text:style-name="Source_20_Text">service.stop(); <text:s/>// Programmatic cleanup</text:span></text:p>
        <text:h text:style-name="Heading_20_3" text:outline-level="3">Managing Emulators Automatically via Capabilities</text:h>
        <text:p text:style-name="Text_20_body">You can tell Appium to automatically boot a specific Android Virtual Device (AVD) if it is offline, eliminating manual startup routines:</text:p>
        <text:p text:style-name="P10">Java</text:p>
        <text:p text:style-name="Preformatted_20_Text"><text:span text:style-name="Source_20_Text">options.setAvd("Pixel_7_Pro");</text:span></text:p>
        <text:p text:style-name="Preformatted_20_Text"><text:span text:style-name="Source_20_Text">options.setAvdLaunchTimeout(Duration.ofMinutes(3));</text:span></text:p>
        <text:p text:style-name="P3"><text:span text:style-name="Source_20_Text">options.setAvdReadyTimeout(Duration.ofMinutes(3));</text:span></text:p>
        <text:h text:style-name="Heading_20_2" text:outline-level="2">8. AppiumDriver vs. AndroidDriver</text:h>
        <text:p text:style-name="Text_20_body">Understanding the class inheritance hierarchy is crucial for robust framework design.</text:p>
        <text:p text:style-name="P2"><text:span text:style-name="Source_20_Text"><text:s text:c="7"/>[ WebDriver (Selenium Base) ]</text:span></text:p>
        <text:p text:style-name="Preformatted_20_Text"><text:span text:style-name="Source_20_Text"><text:s text:c="21"/>|</text:span></text:p>
        <text:p text:style-name="Preformatted_20_Text"><text:span text:style-name="Source_20_Text"><text:s text:c="12"/>[ AppiumDriver ] <text:s/>&lt;-- Abstract, cross-platform base commands</text:span></text:p>
        <text:p text:style-name="Preformatted_20_Text"><text:span text:style-name="Source_20_Text"><text:s text:c="13"/>/ <text:s text:c="11"/>\</text:span></text:p>
        <text:p text:style-name="P3"><text:span text:style-name="Source_20_Text"><text:s text:c="3"/>[ AndroidDriver ] <text:s text:c="3"/>[ IOSDriver ] &lt;-- Platform-specific extensions</text:span></text:p>
        <text:h text:style-name="Heading_20_3" text:outline-level="3">Why avoid creating a generic <text:span text:style-name="Source_20_Text">AppiumDriver</text:span> directly?</text:h>
        <text:p text:style-name="Text_20_body">While <text:span text:style-name="Source_20_Text">AppiumDriver</text:span> handles basic capabilities like finding elements and performing clicks, it <text:span text:style-name="T1">lacks platform-specific context</text:span>. It does not know what an "Android Key Code", "Notification Shade", or "iOS FaceID simulation" is.</text:p>
        <text:h text:style-name="Heading_20_3" text:outline-level="3">Comparison Table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Table_20_Heading">Feature / Method</text:p>
              </table:table-cell>
              <table:table-cell table:style-name="Table1.A1" office:value-type="string">
                <text:p text:style-name="Table_20_Heading"><text:span text:style-name="Source_20_Text">AppiumDriver</text:span></text:p>
              </table:table-cell>
              <table:table-cell table:style-name="Table1.A1" office:value-type="string">
                <text:p text:style-name="Table_20_Heading"><text:span text:style-name="Source_20_Text">AndroidDriver</text:span></text:p>
              </table:table-cell>
            </table:table-row>
          </table:table-header-rows>
          <table:table-row>
            <table:table-cell table:style-name="Table1.A1" office:value-type="string">
              <text:p text:style-name="P5">Scope</text:p>
            </table:table-cell>
            <table:table-cell table:style-name="Table1.A1" office:value-type="string">
              <text:p text:style-name="Table_20_Contents">Cross-platform (Android &amp; iOS <text:soft-page-break/>generic)</text:p>
            </table:table-cell>
            <table:table-cell table:style-name="Table1.A1" office:value-type="string">
              <text:p text:style-name="Table_20_Contents">Android Specific Only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pressKey(KeyEvent key)</text:span></text:p>
            </table:table-cell>
            <table:table-cell table:style-name="Table1.A1" office:value-type="string">
              <text:p text:style-name="Table_20_Contents">❌ Not available</text:p>
            </table:table-cell>
            <table:table-cell table:style-name="Table1.A1" office:value-type="string">
              <text:p text:style-name="Table_20_Contents">Available (Back, Home, Menu buttons)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isDeviceLocked()</text:span></text:p>
            </table:table-cell>
            <table:table-cell table:style-name="Table1.A1" office:value-type="string">
              <text:p text:style-name="Table_20_Contents">❌ Not available</text:p>
            </table:table-cell>
            <table:table-cell table:style-name="Table1.A1" office:value-type="string">
              <text:p text:style-name="Table_20_Contents">Available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openNotifications()</text:span></text:p>
            </table:table-cell>
            <table:table-cell table:style-name="Table1.A1" office:value-type="string">
              <text:p text:style-name="Table_20_Contents">❌ Not available</text:p>
            </table:table-cell>
            <table:table-cell table:style-name="Table1.A1" office:value-type="string">
              <text:p text:style-name="Table_20_Contents">Available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findElement()</text:span></text:p>
            </table:table-cell>
            <table:table-cell table:style-name="Table1.A1" office:value-type="string">
              <text:p text:style-name="Table_20_Contents">Available</text:p>
            </table:table-cell>
            <table:table-cell table:style-name="Table1.A1" office:value-type="string">
              <text:p text:style-name="Table_20_Contents">Available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isKeyboardShown()</text:span></text:p>
            </table:table-cell>
            <table:table-cell table:style-name="Table1.A1" office:value-type="string">
              <text:p text:style-name="Table_20_Contents">❌ Not available</text:p>
            </table:table-cell>
            <table:table-cell table:style-name="Table1.A1" office:value-type="string">
              <text:p text:style-name="Table_20_Contents">Available</text:p>
            </table:table-cell>
          </table:table-row>
        </table:table>
        <text:h text:style-name="Heading_20_2" text:outline-level="2">9. How to Cast <text:span text:style-name="Source_20_Text">AppiumDriver</text:span> to <text:span text:style-name="Source_20_Text">AndroidDriver</text:span></text:h>
        <text:p text:style-name="Text_20_body">If you are building a cross-platform framework, you might instantiate a generic <text:span text:style-name="Source_20_Text">AppiumDriver</text:span> in your base setup to dynamically support multiple OS classes. When you need an Android-specific feature, perform an explicit typecast:</text:p>
        <text:p text:style-name="P10">Java</text:p>
        <text:p text:style-name="Preformatted_20_Text"><text:span text:style-name="Source_20_Text">import io.appium.java_client.AppiumDriver;</text:span></text:p>
        <text:p text:style-name="Preformatted_20_Text"><text:span text:style-name="Source_20_Text">import io.appium.java_client.android.AndroidDriver;</text:span></text:p>
        <text:p text:style-name="Preformatted_20_Text"/>
        <text:p text:style-name="Preformatted_20_Text"><text:span text:style-name="Source_20_Text">// Instantiation as base class reference</text:span></text:p>
        <text:p text:style-name="Preformatted_20_Text"><text:span text:style-name="Source_20_Text">AppiumDriver driver = new AndroidDriver(new URL("http://127.0.0.1:4723/"), options);</text:span></text:p>
        <text:p text:style-name="Preformatted_20_Text"/>
        <text:p text:style-name="Preformatted_20_Text"><text:span text:style-name="Source_20_Text">// Dynamic check and casting when an Android-only event is fired</text:span></text:p>
        <text:p text:style-name="Preformatted_20_Text"><text:span text:style-name="Source_20_Text">if (driver instanceof AndroidDriver) {</text:span></text:p>
        <text:p text:style-name="Preformatted_20_Text"><text:span text:style-name="Source_20_Text"><text:s text:c="4"/>((AndroidDriver) driver).openNotifications(); </text:span></text:p>
        <text:p text:style-name="P3"><text:span text:style-name="Source_20_Text">}</text:span></text:p>
        <text:h text:style-name="Heading_20_2" text:outline-level="2">10. AppiumBy, WebElement, and Their Methods</text:h>
        <text:h text:style-name="Heading_20_3" text:outline-level="3">Locator Strategies (<text:span text:style-name="Source_20_Text">AppiumBy</text:span>)</text:h>
        <text:p text:style-name="Text_20_body">Appium extends Selenium's traditional <text:span text:style-name="Source_20_Text">By</text:span> class with <text:span text:style-name="Source_20_Text">AppiumBy</text:span> to leverage native, high-performance mobile locator strategies.</text:p>
        <text:p text:style-name="P10">Java</text:p>
        <text:p text:style-name="Preformatted_20_Text"><text:span text:style-name="Source_20_Text">import io.appium.java_client.AppiumBy;</text:span></text:p>
        <text:p text:style-name="Preformatted_20_Text"><text:span text:style-name="Source_20_Text">import org.openqa.selenium.WebElement;</text:span></text:p>
        <text:p text:style-name="Preformatted_20_Text"/>
        <text:p text:style-name="Preformatted_20_Text"><text:span text:style-name="Source_20_Text">// 1. Accessibility ID (Most preferred - lightning fast and platform-independent)</text:span></text:p>
        <text:p text:style-name="Preformatted_20_Text"><text:span text:style-name="Source_20_Text">WebElement element1 = driver.findElement(AppiumBy.accessibilityId("submit_btn"));</text:span></text:p>
        <text:p text:style-name="Preformatted_20_Text"/>
        <text:p text:style-name="Preformatted_20_Text"><text:span text:style-name="Source_20_Text">// 2. Android UIAutomator (Leverages Google's underlying engine for complex matches)</text:span></text:p>
        <text:p text:style-name="Preformatted_20_Text"><text:span text:style-name="Source_20_Text">WebElement element2 = driver.findElement(AppiumBy.androidUIAutomator("new UiSelector().text(\"Login\")"));</text:span></text:p>
        <text:p text:style-name="Preformatted_20_Text"/>
        <text:p text:style-name="Preformatted_20_Text"><text:span text:style-name="Source_20_Text">// 3. Resource ID (Platform specific ID asset)</text:span></text:p>
        <text:p text:style-name="Preformatted_20_Text"><text:span text:style-name="Source_20_Text">WebElement element3 = driver.findElement(AppiumBy.id("com.example.myapp:id/username"));</text:span></text:p>
        <text:p text:style-name="Preformatted_20_Text"/>
        <text:p text:style-name="Preformatted_20_Text"><text:span text:style-name="Source_20_Text">// 4. XPath (Slowest evaluation method; use as a last resort)</text:span></text:p>
        <text:p text:style-name="P3"><text:soft-page-break/><text:span text:style-name="Source_20_Text">WebElement element4 = driver.findElement(AppiumBy.xpath("//android.widget.Button[@text='Cancel']"));</text:span></text:p>
        <text:h text:style-name="Heading_20_3" text:outline-level="3">Essential <text:span text:style-name="Source_20_Text">WebElement</text:span> Methods</text:h>
        <text:p text:style-name="Text_20_body">Once an element is fetched, you interact with it using traditional Selenium/Appium methods:</text:p>
        <text:list text:style-name="L6">
          <text:list-item>
            <text:p text:style-name="P12"><text:span text:style-name="Source_20_Text">element.click();</text:span> - Tap on element interface area.</text:p>
          </text:list-item>
          <text:list-item>
            <text:p text:style-name="P12"><text:span text:style-name="Source_20_Text">element.sendKeys("Text");</text:span> - Types string data into a text layout or entry form.</text:p>
          </text:list-item>
          <text:list-item>
            <text:p text:style-name="P12"><text:span text:style-name="Source_20_Text">element.clear();</text:span> - Clears existing inputs in editable boxes.</text:p>
          </text:list-item>
          <text:list-item>
            <text:p text:style-name="P12"><text:span text:style-name="Source_20_Text">element.getAttribute("checked");</text:span> - Retrieves dynamic UI properties (e.g., <text:span text:style-name="Source_20_Text">clickable</text:span>, <text:span text:style-name="Source_20_Text">checked</text:span>, <text:span text:style-name="Source_20_Text">focused</text:span>).</text:p>
          </text:list-item>
        </text:list>
        <text:h text:style-name="Heading_20_2" text:outline-level="2">11. Session ID Management</text:h>
        <text:p text:style-name="Text_20_body">Every time you call <text:span text:style-name="Source_20_Text">new AndroidDriver(...)</text:span>, the Appium Server creates a distinct <text:span text:style-name="T1">Session ID</text:span> (a unique cryptographic string).</text:p>
        <text:h text:style-name="Heading_20_3" text:outline-level="3">Why is this important?</text:h>
        <text:list text:style-name="L7">
          <text:list-item>
            <text:p text:style-name="P13"><text:span text:style-name="T1">State Separation:</text:span> The Session ID ensures concurrent test threads running in parallel do not leak data or send commands to the wrong devices.</text:p>
          </text:list-item>
          <text:list-item>
            <text:p text:style-name="P13"><text:span text:style-name="T1">Driver Reuse / Parallel Testing:</text:span> Parallel grids use Session IDs to dispatch explicit target scripts to specific linked execution screens.</text:p>
          </text:list-item>
          <text:list-item>
            <text:p text:style-name="P13"><text:span text:style-name="T1">Orphaned Sessions:</text:span> If your test script crashes without calling <text:span text:style-name="Source_20_Text">driver.quit();</text:span>, that Session ID remains open on the server, blocking your mobile device or emulator from receiving new instructions.</text:p>
          </text:list-item>
        </text:list>
        <text:p text:style-name="P10">Java</text:p>
        <text:p text:style-name="Preformatted_20_Text"><text:span text:style-name="Source_20_Text">// Accessing Session ID programmatically for debugging logs</text:span></text:p>
        <text:p text:style-name="Preformatted_20_Text"><text:span text:style-name="Source_20_Text">String sessionId = ((AndroidDriver) driver).getSessionId().toString();</text:span></text:p>
        <text:p text:style-name="P3"><text:span text:style-name="Source_20_Text">System.out.println("Active Session ID: " + sessionId);</text:span></text:p>
        <text:p text:style-name="Quotations">⚠️ <text:span text:style-name="T1">Best Practice:</text:span> Always structure your cleanup blocks inside <text:span text:style-name="Source_20_Text">@AfterMethod</text:span> or <text:span text:style-name="Source_20_Text">@AfterClass</text:span> using <text:span text:style-name="Source_20_Text">driver.quit()</text:span> to clean up files and terminate the session.</text:p>
        <text:h text:style-name="Heading_20_2" text:outline-level="2">12. Missing Core Essentials (Crucial Additions)</text:h>
        <text:p text:style-name="Text_20_body">To build a enterprise-ready test automation suite, the following concepts are mandatory additions to your curriculum:</text:p>
        <text:h text:style-name="Heading_20_3" text:outline-level="3">A. Mobile Gestures (W3C Actions API)</text:h>
        <text:p text:style-name="Text_20_body"><text:span text:style-name="Source_20_Text">TouchAction</text:span> and <text:span text:style-name="Source_20_Text">MultiTouchAction</text:span> classes are completely <text:span text:style-name="T1">deprecated</text:span> in modern Appium versions. You must use the native W3C sequence API or convenient <text:span text:style-name="Source_20_Text">executeScript</text:span> mobile commands for scrolls, swipes, drags, and pinches:</text:p>
        <text:p text:style-name="P10"><text:soft-page-break/>Java</text:p>
        <text:p text:style-name="Preformatted_20_Text"><text:span text:style-name="Source_20_Text">import java.util.Map;</text:span></text:p>
        <text:p text:style-name="Preformatted_20_Text"><text:span text:style-name="Source_20_Text">import com.google.common.collect.ImmutableMap;</text:span></text:p>
        <text:p text:style-name="Preformatted_20_Text"/>
        <text:p text:style-name="Preformatted_20_Text"><text:span text:style-name="Source_20_Text">// Fast programmatic scrolling down via Appium extension script</text:span></text:p>
        <text:p text:style-name="Preformatted_20_Text"><text:span text:style-name="Source_20_Text">driver.executeScript("mobile: scrollGesture", ImmutableMap.of(</text:span></text:p>
        <text:p text:style-name="Preformatted_20_Text"><text:span text:style-name="Source_20_Text"><text:s text:c="4"/>"left", 100, "top", 100, "width", 200, "height", 200,</text:span></text:p>
        <text:p text:style-name="Preformatted_20_Text"><text:span text:style-name="Source_20_Text"><text:s text:c="4"/>"direction", "down",</text:span></text:p>
        <text:p text:style-name="Preformatted_20_Text"><text:span text:style-name="Source_20_Text"><text:s text:c="4"/>"percent", 1.0</text:span></text:p>
        <text:p text:style-name="Preformatted_20_Text"><text:span text:style-name="Source_20_Text">));</text:span></text:p>
        <text:p text:style-name="Preformatted_20_Text"/>
        <text:p text:style-name="Preformatted_20_Text"><text:span text:style-name="Source_20_Text">// Long Click Gesture</text:span></text:p>
        <text:p text:style-name="Preformatted_20_Text"><text:span text:style-name="Source_20_Text">driver.executeScript("mobile: longClickGesture", ImmutableMap.of(</text:span></text:p>
        <text:p text:style-name="Preformatted_20_Text"><text:span text:style-name="Source_20_Text"><text:s text:c="4"/>"elementId", ((RemoteWebElement) element).getId(),</text:span></text:p>
        <text:p text:style-name="Preformatted_20_Text"><text:span text:style-name="Source_20_Text"><text:s text:c="4"/>"duration", 2000</text:span></text:p>
        <text:p text:style-name="P3"><text:span text:style-name="Source_20_Text">));</text:span></text:p>
        <text:h text:style-name="Heading_20_3" text:outline-level="3">B. Device Context Switching (Hybrid App Automation)</text:h>
        <text:p text:style-name="Text_20_body">When testing applications that render dynamic web pages inside a mobile frame, you must toggle execution contexts to shift from native screen element tracking to standard HTML document element tracking:</text:p>
        <text:p text:style-name="P10">Java</text:p>
        <text:p text:style-name="Preformatted_20_Text"><text:span text:style-name="Source_20_Text">import java.util.Set;</text:span></text:p>
        <text:p text:style-name="Preformatted_20_Text"/>
        <text:p text:style-name="Preformatted_20_Text"><text:span text:style-name="Source_20_Text">// Fetch all execution contexts (e.g., NATIVE_APP, WEBVIEW_com.example)</text:span></text:p>
        <text:p text:style-name="Preformatted_20_Text"><text:span text:style-name="Source_20_Text">Set&lt;String&gt; contextNames = driver.getContextHandles();</text:span></text:p>
        <text:p text:style-name="Preformatted_20_Text"><text:span text:style-name="Source_20_Text">for (String contextName : contextNames) {</text:span></text:p>
        <text:p text:style-name="Preformatted_20_Text"><text:span text:style-name="Source_20_Text"><text:s text:c="4"/>System.out.println("Context Found: " + contextName);</text:span></text:p>
        <text:p text:style-name="Preformatted_20_Text"><text:span text:style-name="Source_20_Text"><text:s text:c="4"/>if (contextName.contains("WEBVIEW")) {</text:span></text:p>
        <text:p text:style-name="Preformatted_20_Text"><text:span text:style-name="Source_20_Text"><text:s text:c="8"/>driver.context(contextName); // Switches execution engine focus to the web layer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// Perform standard web-based automation commands</text:span></text:p>
        <text:p text:style-name="Preformatted_20_Text"><text:span text:style-name="Source_20_Text">driver.findElement(By.cssSelector("#web_email")).sendKeys("user@domain.com");</text:span></text:p>
        <text:p text:style-name="Preformatted_20_Text"/>
        <text:p text:style-name="Preformatted_20_Text"><text:span text:style-name="Source_20_Text">// Switch back to Native View when done</text:span></text:p>
        <text:p text:style-name="P3"><text:span text:style-name="Source_20_Text">driver.context("NATIVE_APP");</text:span></text:p>
        <text:h text:style-name="Heading_20_3" text:outline-level="3">C. Synchronization and Mobile Synchronization Waits</text:h>
        <text:p text:style-name="Text_20_body">Mobile apps experience network latency and rendering fluctuations. Hardcoded timeouts (<text:span text:style-name="Source_20_Text">Thread.sleep()</text:span>) cause brittle failures. Always use <text:span text:style-name="T1">WebDriverWait</text:span> for explicit element synchronization:</text:p>
        <text:p text:style-name="P10">Java</text:p>
        <text:p text:style-name="Preformatted_20_Text"><text:span text:style-name="Source_20_Text">import org.openqa.selenium.support.ui.WebDriverWait;</text:span></text:p>
        <text:p text:style-name="Preformatted_20_Text"><text:span text:style-name="Source_20_Text">import org.openqa.selenium.support.ui.ExpectedConditions;</text:span></text:p>
        <text:p text:style-name="Preformatted_20_Text"><text:span text:style-name="Source_20_Text">import java.time.Duration;</text:span></text:p>
        <text:p text:style-name="Preformatted_20_Text"/>
        <text:p text:style-name="Preformatted_20_Text"><text:span text:style-name="Source_20_Text">WebDriverWait wait = new WebDriverWait(driver, Duration.ofSeconds(10));</text:span></text:p>
        <text:p text:style-name="Preformatted_20_Text"><text:span text:style-name="Source_20_Text">WebElement dynamicElement = wait.until(</text:span></text:p>
        <text:p text:style-name="Preformatted_20_Text"><text:soft-page-break/><text:span text:style-name="Source_20_Text"><text:s text:c="4"/>ExpectedConditions.visibilityOfElementLocated(AppiumBy.accessibilityId("dashboard_root"))</text:span></text:p>
        <text:p text:style-name="P3"><text:span text:style-name="Source_20_Text">);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17:40:41.892794912</meta:creation-date>
    <dc:date>2026-05-30T17:43:40.315157592</dc:date>
    <meta:editing-duration>PT2M59S</meta:editing-duration>
    <meta:editing-cycles>1</meta:editing-cycles>
    <meta:document-statistic meta:table-count="1" meta:image-count="0" meta:object-count="0" meta:page-count="8" meta:paragraph-count="220" meta:word-count="1499" meta:character-count="12627" meta:non-whitespace-character-count="11073"/>
    <meta:generator>LibreOffice/24.2.7.2$Linux_X86_64 LibreOffice_project/420$Build-2</meta:generator>
  </office:meta>
</office:document-meta>
</file>