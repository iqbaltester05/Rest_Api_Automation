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igh-Level Flow</text:h>
      <text:section text:style-name="Sect1" text:name="code-block-viewer">
        <text:p text:style-name="P1"><text:span text:style-name="Source_20_Text">Java Test Script</text:span></text:p>
        <text:p text:style-name="Preformatted_20_Text"><text:span text:style-name="Source_20_Text"><text:s text:c="7"/>|</text:span></text:p>
        <text:p text:style-name="Preformatted_20_Text"><text:span text:style-name="Source_20_Text"><text:s text:c="7"/>v</text:span></text:p>
        <text:p text:style-name="Preformatted_20_Text"><text:span text:style-name="Source_20_Text">Appium Java Client</text:span></text:p>
        <text:p text:style-name="Preformatted_20_Text"><text:span text:style-name="Source_20_Text"><text:s text:c="7"/>|</text:span></text:p>
        <text:p text:style-name="Preformatted_20_Text"><text:span text:style-name="Source_20_Text"><text:s text:c="7"/>v</text:span></text:p>
        <text:p text:style-name="Preformatted_20_Text"><text:span text:style-name="Source_20_Text">HTTP Request (W3C WebDriver Protocol)</text:span></text:p>
        <text:p text:style-name="Preformatted_20_Text"><text:span text:style-name="Source_20_Text"><text:s text:c="7"/>|</text:span></text:p>
        <text:p text:style-name="Preformatted_20_Text"><text:span text:style-name="Source_20_Text"><text:s text:c="7"/>v</text:span></text:p>
        <text:p text:style-name="Preformatted_20_Text"><text:span text:style-name="Source_20_Text">Appium Server</text:span></text:p>
        <text:p text:style-name="Preformatted_20_Text"><text:span text:style-name="Source_20_Text"><text:s text:c="7"/>|</text:span></text:p>
        <text:p text:style-name="Preformatted_20_Text"><text:span text:style-name="Source_20_Text"><text:s text:c="7"/>v</text:span></text:p>
        <text:p text:style-name="Preformatted_20_Text"><text:span text:style-name="Source_20_Text">Platform Driver</text:span></text:p>
        <text:p text:style-name="Preformatted_20_Text"><text:span text:style-name="Source_20_Text">(Android -&gt; UiAutomator2)</text:span></text:p>
        <text:p text:style-name="Preformatted_20_Text"><text:span text:style-name="Source_20_Text">(iOS -&gt; XCUITest)</text:span></text:p>
        <text:p text:style-name="Preformatted_20_Text"><text:span text:style-name="Source_20_Text"><text:s text:c="7"/>|</text:span></text:p>
        <text:p text:style-name="Preformatted_20_Text"><text:span text:style-name="Source_20_Text"><text:s text:c="7"/>v</text:span></text:p>
        <text:p text:style-name="Preformatted_20_Text"><text:span text:style-name="Source_20_Text">Automation Agent Installed On Device</text:span></text:p>
        <text:p text:style-name="Preformatted_20_Text"><text:span text:style-name="Source_20_Text"><text:s text:c="7"/>|</text:span></text:p>
        <text:p text:style-name="Preformatted_20_Text"><text:span text:style-name="Source_20_Text"><text:s text:c="7"/>v</text:span></text:p>
        <text:p text:style-name="Preformatted_20_Text"><text:span text:style-name="Source_20_Text">Mobile Device</text:span></text:p>
        <text:p text:style-name="Preformatted_20_Text"><text:span text:style-name="Source_20_Text"><text:s text:c="7"/>|</text:span></text:p>
        <text:p text:style-name="Preformatted_20_Text"><text:span text:style-name="Source_20_Text"><text:s text:c="7"/>v</text:span></text:p>
        <text:p text:style-name="P3"><text:span text:style-name="Source_20_Text">Action Performed</text:span></text:p>
      </text:section>
      <text:p text:style-name="Horizontal_20_Line"/>
      <text:h text:style-name="Heading_20_1" text:outline-level="1">Example</text:h>
      <text:p text:style-name="Text_20_body">Suppose your code is:</text:p>
      <text:section text:style-name="Sect1" text:name="Section1">
        <text:p text:style-name="P2"><text:bookmark text:name="code-block-viewer"/><text:span text:style-name="Source_20_Text">driver.findElement(AppiumBy.id("login_btn")).click();</text:span></text:p>
      </text:section>
      <text:p text:style-name="Text_20_body">You write one line.</text:p>
      <text:p text:style-name="Text_20_body">But internally many things happen.</text:p>
      <text:p text:style-name="Horizontal_20_Line"/>
      <text:h text:style-name="Heading_20_1" text:outline-level="1">Step 1: Java Code Execution</text:h>
      <text:p text:style-name="Text_20_body">Your test starts.</text:p>
      <text:section text:style-name="Sect1" text:name="Section2">
        <text:p text:style-name="P1"><text:bookmark text:name="code-block-viewer Copy 1"/><text:span text:style-name="Source_20_Text">AndroidDriver driver =</text:span></text:p>
        <text:p text:style-name="P3"><text:span text:style-name="Source_20_Text"><text:s text:c="8"/>new AndroidDriver(serverURL, options);</text:span></text:p>
      </text:section>
      <text:p text:style-name="Text_20_body">This creates a connection with Appium Server.</text:p>
      <text:p text:style-name="Text_20_body">Example:</text:p>
      <text:section text:style-name="Sect1" text:name="Section3">
        <text:p text:style-name="P2"><text:bookmark text:name="code-block-viewer Copy 2"/><text:span text:style-name="Source_20_Text">http://127.0.0.1:4723</text:span></text:p>
      </text:section>
      <text:p text:style-name="Text_20_body">At this moment Java does not know anything about the device.</text:p>
      <text:p text:style-name="Text_20_body">It simply sends a request.</text:p>
      <text:p text:style-name="Horizontal_20_Line"><text:soft-page-break/></text:p>
      <text:h text:style-name="Heading_20_1" text:outline-level="1">Step 2: Session Creation</text:h>
      <text:p text:style-name="Text_20_body">When driver is created:</text:p>
      <text:section text:style-name="Sect1" text:name="Section4">
        <text:p text:style-name="P2"><text:bookmark text:name="code-block-viewer Copy 3"/><text:span text:style-name="Source_20_Text">new AndroidDriver(serverURL, options);</text:span></text:p>
      </text:section>
      <text:p text:style-name="Text_20_body">Appium sends:</text:p>
      <text:section text:style-name="Sect1" text:name="Section5">
        <text:p text:style-name="P2"><text:bookmark text:name="code-block-viewer Copy 4"/><text:span text:style-name="Source_20_Text">POST /session</text:span></text:p>
      </text:section>
      <text:p text:style-name="Text_20_body">Request contains capabilities:</text:p>
      <text:section text:style-name="Sect1" text:name="Section6">
        <text:p text:style-name="P1"><text:bookmark text:name="code-block-viewer Copy 5"/><text:span text:style-name="Source_20_Text">{</text:span></text:p>
        <text:p text:style-name="Preformatted_20_Text"><text:span text:style-name="Source_20_Text"><text:s text:c="2"/>"platformName": "Android",</text:span></text:p>
        <text:p text:style-name="Preformatted_20_Text"><text:span text:style-name="Source_20_Text"><text:s text:c="2"/>"deviceName": "Pixel",</text:span></text:p>
        <text:p text:style-name="Preformatted_20_Text"><text:span text:style-name="Source_20_Text"><text:s text:c="2"/>"automationName": "UiAutomator2",</text:span></text:p>
        <text:p text:style-name="Preformatted_20_Text"><text:span text:style-name="Source_20_Text"><text:s text:c="2"/>"appPackage": "com.demo",</text:span></text:p>
        <text:p text:style-name="Preformatted_20_Text"><text:span text:style-name="Source_20_Text"><text:s text:c="2"/>"appActivity": ".MainActivity"</text:span></text:p>
        <text:p text:style-name="P3"><text:span text:style-name="Source_20_Text">}</text:span></text:p>
      </text:section>
      <text:p text:style-name="Horizontal_20_Line"/>
      <text:h text:style-name="Heading_20_1" text:outline-level="1">Step 3: Appium Server Receives Request</text:h>
      <text:p text:style-name="Text_20_body">Appium Server is like a translator.</text:p>
      <text:p text:style-name="Text_20_body">It receives:</text:p>
      <text:section text:style-name="Sect1" text:name="Section7">
        <text:p text:style-name="P2"><text:bookmark text:name="code-block-viewer Copy 6"/><text:span text:style-name="Source_20_Text">POST /session</text:span></text:p>
      </text:section>
      <text:p text:style-name="Text_20_body">and checks:</text:p>
      <text:section text:style-name="Sect1" text:name="Section8">
        <text:p text:style-name="P1"><text:bookmark text:name="code-block-viewer Copy 7"/><text:span text:style-name="Source_20_Text">Platform = Android</text:span></text:p>
        <text:p text:style-name="P3"><text:span text:style-name="Source_20_Text">Automation = UiAutomator2</text:span></text:p>
      </text:section>
      <text:p text:style-name="Text_20_body">So Appium decides:</text:p>
      <text:section text:style-name="Sect1" text:name="Section9">
        <text:p text:style-name="P2"><text:bookmark text:name="code-block-viewer Copy 8"/><text:span text:style-name="Source_20_Text">Use UiAutomator2 Driver</text:span></text:p>
      </text:section>
      <text:p text:style-name="Horizontal_20_Line"/>
      <text:h text:style-name="Heading_20_1" text:outline-level="1">Step 4: Appium Prepares Device</text:h>
      <text:p text:style-name="Text_20_body">Appium now:</text:p>
      <text:h text:style-name="Heading_20_3" text:outline-level="3">Checks Device</text:h>
      <text:section text:style-name="Sect1" text:name="Section10">
        <text:p text:style-name="P2"><text:bookmark text:name="code-block-viewer Copy 9"/><text:span text:style-name="Source_20_Text">adb devices</text:span></text:p>
      </text:section>
      <text:h text:style-name="Heading_20_3" text:outline-level="3">Installs Appium Components</text:h>
      <text:p text:style-name="Text_20_body">Usually:</text:p>
      <text:section text:style-name="Sect1" text:name="Section11">
        <text:p text:style-name="P1"><text:bookmark text:name="code-block-viewer Copy 10"/><text:soft-page-break/><text:span text:style-name="Source_20_Text">appium-uiautomator2-server</text:span></text:p>
        <text:p text:style-name="P3"><text:span text:style-name="Source_20_Text">appium-settings</text:span></text:p>
      </text:section>
      <text:p text:style-name="Text_20_body">are installed on the device.</text:p>
      <text:p text:style-name="Horizontal_20_Line"/>
      <text:h text:style-name="Heading_20_1" text:outline-level="1">Step 5: UiAutomator2 Server Starts</text:h>
      <text:p text:style-name="Text_20_body">Inside device:</text:p>
      <text:section text:style-name="Sect1" text:name="Section12">
        <text:p text:style-name="P1"><text:bookmark text:name="code-block-viewer Copy 11"/><text:span text:style-name="Source_20_Text">Phone</text:span></text:p>
        <text:p text:style-name="P3"><text:span text:style-name="Source_20_Text"><text:s/>└── UiAutomator2 Server APK</text:span></text:p>
      </text:section>
      <text:p text:style-name="Text_20_body">This server listens for commands.</text:p>
      <text:p text:style-name="Text_20_body">Think:</text:p>
      <text:section text:style-name="Sect1" text:name="Section13">
        <text:p text:style-name="P1"><text:bookmark text:name="code-block-viewer Copy 12"/><text:span text:style-name="Source_20_Text">Java Code</text:span></text:p>
        <text:p text:style-name="Preformatted_20_Text"><text:span text:style-name="Source_20_Text"><text:s text:c="3"/>↓</text:span></text:p>
        <text:p text:style-name="Preformatted_20_Text"><text:span text:style-name="Source_20_Text">Appium Server</text:span></text:p>
        <text:p text:style-name="Preformatted_20_Text"><text:span text:style-name="Source_20_Text"><text:s text:c="3"/>↓</text:span></text:p>
        <text:p text:style-name="Preformatted_20_Text"><text:span text:style-name="Source_20_Text">UiAutomator2 Server</text:span></text:p>
        <text:p text:style-name="Preformatted_20_Text"><text:span text:style-name="Source_20_Text"><text:s text:c="3"/>↓</text:span></text:p>
        <text:p text:style-name="P3"><text:span text:style-name="Source_20_Text">Android OS</text:span></text:p>
      </text:section>
      <text:p text:style-name="Horizontal_20_Line"/>
      <text:h text:style-name="Heading_20_1" text:outline-level="1">Step 6: Session ID Created</text:h>
      <text:p text:style-name="Text_20_body">Appium creates:</text:p>
      <text:section text:style-name="Sect1" text:name="Section14">
        <text:p text:style-name="P1"><text:bookmark text:name="code-block-viewer Copy 13"/><text:span text:style-name="Source_20_Text">{</text:span></text:p>
        <text:p text:style-name="Preformatted_20_Text"><text:span text:style-name="Source_20_Text"><text:s text:c="2"/>"sessionId":"abc123xyz"</text:span></text:p>
        <text:p text:style-name="P3"><text:span text:style-name="Source_20_Text">}</text:span></text:p>
      </text:section>
      <text:p text:style-name="Text_20_body">Example:</text:p>
      <text:section text:style-name="Sect1" text:name="Section15">
        <text:p text:style-name="P2"><text:bookmark text:name="code-block-viewer Copy 14"/><text:span text:style-name="Source_20_Text">Session ID = abc123xyz</text:span></text:p>
      </text:section>
      <text:p text:style-name="Text_20_body">Now every command uses this session.</text:p>
      <text:p text:style-name="Horizontal_20_Line"/>
      <text:h text:style-name="Heading_20_1" text:outline-level="1">What Is Session ID?</text:h>
      <text:p text:style-name="Text_20_body">Think of it as:</text:p>
      <text:section text:style-name="Sect1" text:name="Section16">
        <text:p text:style-name="P2"><text:bookmark text:name="code-block-viewer Copy 15"/><text:span text:style-name="Source_20_Text">Device Connection ID</text:span></text:p>
      </text:section>
      <text:p text:style-name="Text_20_body">Without session id Appium doesn't know which device to talk to.</text:p>
      <text:p text:style-name="Text_20_body">Example:</text:p>
      <text:section text:style-name="Sect1" text:name="Section17">
        <text:p text:style-name="P1"><text:bookmark text:name="code-block-viewer Copy 16"/><text:span text:style-name="Source_20_Text">Phone1 -&gt; sessionA</text:span></text:p>
        <text:p text:style-name="P3"><text:span text:style-name="Source_20_Text">Phone2 -&gt; sessionB</text:span></text:p>
      </text:section>
      <text:p text:style-name="Horizontal_20_Line"><text:soft-page-break/></text:p>
      <text:h text:style-name="Heading_20_1" text:outline-level="1">Step 7: Find Element</text:h>
      <text:p text:style-name="Text_20_body">Code:</text:p>
      <text:section text:style-name="Sect1" text:name="Section18">
        <text:p text:style-name="P2"><text:bookmark text:name="code-block-viewer Copy 17"/><text:span text:style-name="Source_20_Text">driver.findElement(AppiumBy.id("login_btn"));</text:span></text:p>
      </text:section>
      <text:p text:style-name="Text_20_body">Java Client converts it into:</text:p>
      <text:section text:style-name="Sect1" text:name="Section19">
        <text:p text:style-name="P2"><text:bookmark text:name="code-block-viewer Copy 18"/><text:span text:style-name="Source_20_Text">POST /session/abc123xyz/element</text:span></text:p>
      </text:section>
      <text:p text:style-name="Text_20_body">Body:</text:p>
      <text:section text:style-name="Sect1" text:name="Section20">
        <text:p text:style-name="P1"><text:bookmark text:name="code-block-viewer Copy 19"/><text:span text:style-name="Source_20_Text">{</text:span></text:p>
        <text:p text:style-name="Preformatted_20_Text"><text:span text:style-name="Source_20_Text"><text:s text:c="2"/>"using":"id",</text:span></text:p>
        <text:p text:style-name="Preformatted_20_Text"><text:span text:style-name="Source_20_Text"><text:s text:c="2"/>"value":"login_btn"</text:span></text:p>
        <text:p text:style-name="P3"><text:span text:style-name="Source_20_Text">}</text:span></text:p>
      </text:section>
      <text:p text:style-name="Horizontal_20_Line"/>
      <text:h text:style-name="Heading_20_1" text:outline-level="1">Step 8: Appium Server Receives It</text:h>
      <text:p text:style-name="Text_20_body">Appium receives:</text:p>
      <text:section text:style-name="Sect1" text:name="Section21">
        <text:p text:style-name="P2"><text:bookmark text:name="code-block-viewer Copy 20"/><text:span text:style-name="Source_20_Text">Find element login_btn</text:span></text:p>
      </text:section>
      <text:p text:style-name="Text_20_body">and forwards to:</text:p>
      <text:section text:style-name="Sect1" text:name="Section22">
        <text:p text:style-name="P2"><text:bookmark text:name="code-block-viewer Copy 21"/><text:span text:style-name="Source_20_Text">UiAutomator2 Server</text:span></text:p>
      </text:section>
      <text:p text:style-name="Horizontal_20_Line"/>
      <text:h text:style-name="Heading_20_1" text:outline-level="1">Step 9: UiAutomator2 Searches UI Tree</text:h>
      <text:p text:style-name="Text_20_body">Android UI looks like:</text:p>
      <text:section text:style-name="Sect1" text:name="Section23">
        <text:p text:style-name="P1"><text:bookmark text:name="code-block-viewer Copy 22"/><text:span text:style-name="Source_20_Text">Screen</text:span></text:p>
        <text:p text:style-name="Preformatted_20_Text"><text:span text:style-name="Source_20_Text"><text:s/>├── TextView</text:span></text:p>
        <text:p text:style-name="Preformatted_20_Text"><text:span text:style-name="Source_20_Text"><text:s/>├── EditText</text:span></text:p>
        <text:p text:style-name="P3"><text:span text:style-name="Source_20_Text"><text:s/>└── Button(login_btn)</text:span></text:p>
      </text:section>
      <text:p text:style-name="Text_20_body">UiAutomator2 scans the hierarchy.</text:p>
      <text:p text:style-name="Text_20_body">Finds:</text:p>
      <text:section text:style-name="Sect1" text:name="Section24">
        <text:p text:style-name="P2"><text:bookmark text:name="code-block-viewer Copy 23"/><text:span text:style-name="Source_20_Text">Button(login_btn)</text:span></text:p>
      </text:section>
      <text:p text:style-name="Text_20_body">Returns:</text:p>
      <text:section text:style-name="Sect1" text:name="Section25">
        <text:p text:style-name="P1"><text:bookmark text:name="code-block-viewer Copy 24"/><text:span text:style-name="Source_20_Text">{</text:span></text:p>
        <text:p text:style-name="Preformatted_20_Text"><text:span text:style-name="Source_20_Text"><text:s text:c="2"/>"elementId":"00001"</text:span></text:p>
        <text:p text:style-name="P3"><text:span text:style-name="Source_20_Text">}</text:span></text:p>
      </text:section>
      <text:p text:style-name="Horizontal_20_Line"/>
      <text:h text:style-name="Heading_20_1" text:outline-level="1"><text:soft-page-break/>Step 10: Click Command</text:h>
      <text:p text:style-name="Text_20_body">Code:</text:p>
      <text:section text:style-name="Sect1" text:name="Section26">
        <text:p text:style-name="P2"><text:bookmark text:name="code-block-viewer Copy 25"/><text:span text:style-name="Source_20_Text">element.click();</text:span></text:p>
      </text:section>
      <text:p text:style-name="Text_20_body">Java Client sends:</text:p>
      <text:section text:style-name="Sect1" text:name="Section27">
        <text:p text:style-name="P2"><text:bookmark text:name="code-block-viewer Copy 26"/><text:span text:style-name="Source_20_Text">POST /session/abc123xyz/element/00001/click</text:span></text:p>
      </text:section>
      <text:p text:style-name="Text_20_body">Appium forwards it.</text:p>
      <text:p text:style-name="Text_20_body">UiAutomator2 tells Android:</text:p>
      <text:section text:style-name="Sect1" text:name="Section28">
        <text:p text:style-name="P2"><text:bookmark text:name="code-block-viewer Copy 27"/><text:span text:style-name="Source_20_Text">Tap on coordinates</text:span></text:p>
      </text:section>
      <text:p text:style-name="Text_20_body">Android performs click.</text:p>
      <text:p text:style-name="Horizontal_20_Line"/>
      <text:h text:style-name="Heading_20_1" text:outline-level="1">Response Returns Back</text:h>
      <text:section text:style-name="Sect1" text:name="Section29">
        <text:p text:style-name="P1"><text:bookmark text:name="code-block-viewer Copy 28"/><text:span text:style-name="Source_20_Text">Android</text:span></text:p>
        <text:p text:style-name="Preformatted_20_Text"><text:span text:style-name="Source_20_Text"><text:s text:c="3"/>↓</text:span></text:p>
        <text:p text:style-name="Preformatted_20_Text"><text:span text:style-name="Source_20_Text">UiAutomator2</text:span></text:p>
        <text:p text:style-name="Preformatted_20_Text"><text:span text:style-name="Source_20_Text"><text:s text:c="3"/>↓</text:span></text:p>
        <text:p text:style-name="Preformatted_20_Text"><text:span text:style-name="Source_20_Text">Appium Server</text:span></text:p>
        <text:p text:style-name="Preformatted_20_Text"><text:span text:style-name="Source_20_Text"><text:s text:c="3"/>↓</text:span></text:p>
        <text:p text:style-name="P3"><text:span text:style-name="Source_20_Text">Java Client</text:span></text:p>
      </text:section>
      <text:p text:style-name="Text_20_body">Response:</text:p>
      <text:section text:style-name="Sect1" text:name="Section30">
        <text:p text:style-name="P1"><text:bookmark text:name="code-block-viewer Copy 29"/><text:span text:style-name="Source_20_Text">{</text:span></text:p>
        <text:p text:style-name="Preformatted_20_Text"><text:span text:style-name="Source_20_Text"><text:s text:c="3"/>"status":"success"</text:span></text:p>
        <text:p text:style-name="P3"><text:span text:style-name="Source_20_Text">}</text:span></text:p>
      </text:section>
      <text:p text:style-name="Horizontal_20_Line"/>
      <text:h text:style-name="Heading_20_1" text:outline-level="1">Complete Request Flow</text:h>
      <text:section text:style-name="Sect1" text:name="Section31">
        <text:p text:style-name="P1"><text:bookmark text:name="code-block-viewer Copy 30"/><text:span text:style-name="Source_20_Text">driver.click()</text:span></text:p>
        <text:p text:style-name="Preformatted_20_Text"><text:span text:style-name="Source_20_Text"><text:s text:c="6"/>|</text:span></text:p>
        <text:p text:style-name="Preformatted_20_Text"><text:span text:style-name="Source_20_Text"><text:s text:c="6"/>v</text:span></text:p>
        <text:p text:style-name="Preformatted_20_Text"><text:span text:style-name="Source_20_Text">Appium Java Client</text:span></text:p>
        <text:p text:style-name="Preformatted_20_Text"><text:span text:style-name="Source_20_Text"><text:s text:c="6"/>|</text:span></text:p>
        <text:p text:style-name="Preformatted_20_Text"><text:span text:style-name="Source_20_Text">HTTP Request</text:span></text:p>
        <text:p text:style-name="Preformatted_20_Text"><text:span text:style-name="Source_20_Text"><text:s text:c="6"/>|</text:span></text:p>
        <text:p text:style-name="Preformatted_20_Text"><text:span text:style-name="Source_20_Text"><text:s text:c="6"/>v</text:span></text:p>
        <text:p text:style-name="Preformatted_20_Text"><text:span text:style-name="Source_20_Text">Appium Server</text:span></text:p>
        <text:p text:style-name="Preformatted_20_Text"><text:span text:style-name="Source_20_Text"><text:s text:c="6"/>|</text:span></text:p>
        <text:p text:style-name="Preformatted_20_Text"><text:span text:style-name="Source_20_Text"><text:s text:c="6"/>v</text:span></text:p>
        <text:p text:style-name="Preformatted_20_Text"><text:span text:style-name="Source_20_Text">UiAutomator2 Driver</text:span></text:p>
        <text:p text:style-name="Preformatted_20_Text"><text:span text:style-name="Source_20_Text"><text:s text:c="6"/>|</text:span></text:p>
        <text:p text:style-name="Preformatted_20_Text"><text:span text:style-name="Source_20_Text"><text:s text:c="6"/>v</text:span></text:p>
        <text:p text:style-name="Preformatted_20_Text"><text:span text:style-name="Source_20_Text">UiAutomator2 Server APK</text:span></text:p>
        <text:p text:style-name="Preformatted_20_Text"><text:span text:style-name="Source_20_Text"><text:s text:c="6"/>|</text:span></text:p>
        <text:p text:style-name="Preformatted_20_Text"><text:span text:style-name="Source_20_Text"><text:s text:c="6"/>v</text:span></text:p>
        <text:p text:style-name="Preformatted_20_Text"><text:span text:style-name="Source_20_Text">Android Framework</text:span></text:p>
        <text:p text:style-name="Preformatted_20_Text"><text:soft-page-break/><text:span text:style-name="Source_20_Text"><text:s text:c="6"/>|</text:span></text:p>
        <text:p text:style-name="Preformatted_20_Text"><text:span text:style-name="Source_20_Text"><text:s text:c="6"/>v</text:span></text:p>
        <text:p text:style-name="P3"><text:span text:style-name="Source_20_Text">Mobile Screen Click</text:span></text:p>
      </text:section>
      <text:p text:style-name="Horizontal_20_Line"/>
      <text:h text:style-name="Heading_20_1" text:outline-level="1">What Happens During SendKeys?</text:h>
      <text:p text:style-name="Text_20_body">Code:</text:p>
      <text:section text:style-name="Sect1" text:name="Section32">
        <text:p text:style-name="P2"><text:bookmark text:name="code-block-viewer Copy 31"/><text:span text:style-name="Source_20_Text">username.sendKeys("Iqbal");</text:span></text:p>
      </text:section>
      <text:p text:style-name="Text_20_body">Request:</text:p>
      <text:section text:style-name="Sect1" text:name="Section33">
        <text:p text:style-name="P2"><text:bookmark text:name="code-block-viewer Copy 32"/><text:span text:style-name="Source_20_Text">POST /value</text:span></text:p>
      </text:section>
      <text:p text:style-name="Text_20_body">Body:</text:p>
      <text:section text:style-name="Sect1" text:name="Section34">
        <text:p text:style-name="P1"><text:bookmark text:name="code-block-viewer Copy 33"/><text:span text:style-name="Source_20_Text">{</text:span></text:p>
        <text:p text:style-name="Preformatted_20_Text"><text:span text:style-name="Source_20_Text"><text:s text:c="2"/>"text":"Iqbal"</text:span></text:p>
        <text:p text:style-name="P3"><text:span text:style-name="Source_20_Text">}</text:span></text:p>
      </text:section>
      <text:p text:style-name="Text_20_body">Appium forwards.</text:p>
      <text:p text:style-name="Text_20_body">Android keyboard enters:</text:p>
      <text:section text:style-name="Sect1" text:name="Section35">
        <text:p text:style-name="P2"><text:bookmark text:name="code-block-viewer Copy 34"/><text:span text:style-name="Source_20_Text">Iqbal</text:span></text:p>
      </text:section>
      <text:p text:style-name="Horizontal_20_Line"/>
      <text:h text:style-name="Heading_20_1" text:outline-level="1">How Swipe Works</text:h>
      <text:p text:style-name="Text_20_body">Code:</text:p>
      <text:section text:style-name="Sect1" text:name="Section36">
        <text:p text:style-name="P2"><text:bookmark text:name="code-block-viewer Copy 35"/><text:span text:style-name="Source_20_Text">new TouchAction(driver)</text:span></text:p>
      </text:section>
      <text:p text:style-name="Text_20_body">or W3C Actions.</text:p>
      <text:p text:style-name="Text_20_body">Appium sends:</text:p>
      <text:section text:style-name="Sect1" text:name="Section37">
        <text:p text:style-name="P1"><text:bookmark text:name="code-block-viewer Copy 36"/><text:span text:style-name="Source_20_Text">pointerDown</text:span></text:p>
        <text:p text:style-name="Preformatted_20_Text"><text:span text:style-name="Source_20_Text">pointerMove</text:span></text:p>
        <text:p text:style-name="P3"><text:span text:style-name="Source_20_Text">pointerUp</text:span></text:p>
      </text:section>
      <text:p text:style-name="Text_20_body">UiAutomator2 converts to:</text:p>
      <text:section text:style-name="Sect1" text:name="Section38">
        <text:p text:style-name="P1"><text:bookmark text:name="code-block-viewer Copy 37"/><text:span text:style-name="Source_20_Text">Finger Touch</text:span></text:p>
        <text:p text:style-name="Preformatted_20_Text"><text:span text:style-name="Source_20_Text">Move</text:span></text:p>
        <text:p text:style-name="P3"><text:span text:style-name="Source_20_Text">Release</text:span></text:p>
      </text:section>
      <text:p text:style-name="Text_20_body">Android thinks a real user performed gesture.</text:p>
      <text:p text:style-name="Horizontal_20_Line"/>
      <text:h text:style-name="Heading_20_1" text:outline-level="1"><text:soft-page-break/>Why Appium Server Is Required</text:h>
      <text:p text:style-name="Text_20_body">Without Appium:</text:p>
      <text:section text:style-name="Sect1" text:name="Section39">
        <text:p text:style-name="P1"><text:bookmark text:name="code-block-viewer Copy 38"/><text:span text:style-name="Source_20_Text">Java Code</text:span></text:p>
        <text:p text:style-name="Preformatted_20_Text"><text:span text:style-name="Source_20_Text"><text:s text:c="4"/>X</text:span></text:p>
        <text:p text:style-name="P3"><text:span text:style-name="Source_20_Text">Android Device</text:span></text:p>
      </text:section>
      <text:p text:style-name="Text_20_body">Java cannot directly talk to Android UI.</text:p>
      <text:p text:style-name="Text_20_body">Appium acts as translator.</text:p>
      <text:section text:style-name="Sect1" text:name="Section40">
        <text:p text:style-name="P1"><text:bookmark text:name="code-block-viewer Copy 39"/><text:span text:style-name="Source_20_Text">Java</text:span></text:p>
        <text:p text:style-name="Preformatted_20_Text"><text:span text:style-name="Source_20_Text"><text:s/>↓</text:span></text:p>
        <text:p text:style-name="Preformatted_20_Text"><text:span text:style-name="Source_20_Text">Appium</text:span></text:p>
        <text:p text:style-name="Preformatted_20_Text"><text:span text:style-name="Source_20_Text"><text:s/>↓</text:span></text:p>
        <text:p text:style-name="P3"><text:span text:style-name="Source_20_Text">Android</text:span></text:p>
      </text:section>
      <text:p text:style-name="Horizontal_20_Line"/>
      <text:h text:style-name="Heading_20_1" text:outline-level="1">Multiple Devices Flow</text:h>
      <text:p text:style-name="Text_20_body">Suppose:</text:p>
      <text:section text:style-name="Sect1" text:name="Section41">
        <text:p text:style-name="P1"><text:bookmark text:name="code-block-viewer Copy 40"/><text:span text:style-name="Source_20_Text">Device1 = Samsung</text:span></text:p>
        <text:p text:style-name="P3"><text:span text:style-name="Source_20_Text">Device2 = Pixel</text:span></text:p>
      </text:section>
      <text:p text:style-name="Text_20_body">You create:</text:p>
      <text:section text:style-name="Sect1" text:name="Section42">
        <text:p text:style-name="P1"><text:bookmark text:name="code-block-viewer Copy 41"/><text:span text:style-name="Source_20_Text">AndroidDriver driver1;</text:span></text:p>
        <text:p text:style-name="P3"><text:span text:style-name="Source_20_Text">AndroidDriver driver2;</text:span></text:p>
      </text:section>
      <text:p text:style-name="Text_20_body">Appium creates:</text:p>
      <text:section text:style-name="Sect1" text:name="Section43">
        <text:p text:style-name="P1"><text:bookmark text:name="code-block-viewer Copy 42"/><text:span text:style-name="Source_20_Text">SessionA -&gt; Samsung</text:span></text:p>
        <text:p text:style-name="P3"><text:span text:style-name="Source_20_Text">SessionB -&gt; Pixel</text:span></text:p>
      </text:section>
      <text:p text:style-name="Text_20_body">Commands:</text:p>
      <text:section text:style-name="Sect1" text:name="Section44">
        <text:p text:style-name="P2"><text:bookmark text:name="code-block-viewer Copy 43"/><text:span text:style-name="Source_20_Text">driver1.click();</text:span></text:p>
      </text:section>
      <text:p text:style-name="Text_20_body">go to:</text:p>
      <text:section text:style-name="Sect1" text:name="Section45">
        <text:p text:style-name="P2"><text:bookmark text:name="code-block-viewer Copy 44"/><text:span text:style-name="Source_20_Text">SessionA</text:span></text:p>
      </text:section>
      <text:p text:style-name="Text_20_body">Commands:</text:p>
      <text:section text:style-name="Sect1" text:name="Section46">
        <text:p text:style-name="P2"><text:bookmark text:name="code-block-viewer Copy 45"/><text:span text:style-name="Source_20_Text">driver2.click();</text:span></text:p>
      </text:section>
      <text:p text:style-name="Text_20_body">go to:</text:p>
      <text:section text:style-name="Sect1" text:name="Section47">
        <text:p text:style-name="P2"><text:bookmark text:name="code-block-viewer Copy 46"/><text:span text:style-name="Source_20_Text">SessionB</text:span></text:p>
      </text:section>
      <text:p text:style-name="Text_20_body">This is how you can:</text:p>
      <text:list text:style-name="L1">
        <text:list-item>
          <text:p text:style-name="P5">Send message from Phone A </text:p>
        </text:list-item>
        <text:list-item>
          <text:p text:style-name="P4">Verify notification on Phone B </text:p>
        </text:list-item>
      </text:list>
      <text:p text:style-name="Text_20_body"><text:soft-page-break/>in the same test.</text:p>
      <text:p text:style-name="Horizontal_20_Line"/>
      <text:h text:style-name="Heading_20_1" text:outline-level="1">Real Interview Question</text:h>
      <text:p text:style-name="Text_20_body"><text:span text:style-name="Strong_20_Emphasis">Q: Does Appium directly interact with mobile elements?</text:span></text:p>
      <text:p text:style-name="Text_20_body">Answer:</text:p>
      <text:p text:style-name="Quotations">No. Appium follows the W3C WebDriver protocol. The client sends HTTP requests to the Appium Server, which forwards them to platform-specific automation engines such as UiAutomator2 (Android) or XCUITest (iOS). These engines perform the actual interaction on the device.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0T00:09:26.515556703</meta:creation-date>
    <dc:date>2026-05-30T17:40:24.645386886</dc:date>
    <meta:editing-duration>PT17H20M14S</meta:editing-duration>
    <meta:editing-cycles>1</meta:editing-cycles>
    <meta:document-statistic meta:table-count="0" meta:image-count="0" meta:object-count="0" meta:page-count="8" meta:paragraph-count="232" meta:word-count="576" meta:character-count="4090" meta:non-whitespace-character-count="3511"/>
    <meta:generator>LibreOffice/24.2.7.2$Linux_X86_64 LibreOffice_project/420$Build-2</meta:generator>
  </office:meta>
</office:document-meta>
</file>